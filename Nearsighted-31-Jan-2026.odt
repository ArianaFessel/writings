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Nearsighted, 31 Jan. 2026</text:p>
      <text:p text:style-name="Normal"/>
      <text:p text:style-name="Normal">I woke; it was dim and empty.</text:p>
      <text:p text:style-name="Normal"/>
      <text:p text:style-name="Normal">A sense of impending danger next came over me. I stood.</text:p>
      <text:p text:style-name="Normal"> <text:s text:c="1"/>The next moment I smelled cinder. I heard a clap of thunder and a shattered window. The world trembled.</text:p>
      <text:p text:style-name="Normal"> <text:s text:c="1"/>The next second, the room was on fire; walls were melting. My clothes rapidly burned down to ashes. Unable to breathe, I coughed.</text:p>
      <text:p text:style-name="Normal"> <text:s text:c="1"/>The next instant, however, everything vanished.</text:p>
      <text:p text:style-name="Normal"/>
      <text:p text:style-name="Normal">And in the while after that I could see again.</text:p>
      <text:p text:style-name="Normal"/>
      <text:p text:style-name="Normal">On the cold ground made of stone, barefoot, I stood in the middle of town.</text:p>
      <text:p text:style-name="Normal"> <text:s text:c="1"/>Huge crowds were around, with so many people it made me anxious. Though I was avoided, none paid attention to the fact I was nude. I did not care, either.</text:p>
      <text:p text:style-name="Normal"/>
      <text:p text:style-name="Normal">Leisurely strolling in a random direction, I eventually stopped in front of some building.</text:p>
      <text:p text:style-name="Normal"> <text:s text:c="1"/>Through the glass storefront only three persons could be discerned.</text:p>
      <text:p text:style-name="Normal"> <text:s text:c="1"/>One of them was a young maiden with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s I sat up from the hard surface, strangely, my body ached. I thought I was used to it.</text:p>
      <text:p text:style-name="Normal"> <text:s text:c="1"/>Through the window I saw a landscape covered in white, the snowflakes swirled with tremendous force.</text:p>
      <text:p text:style-name="Normal"> <text:s text:c="1"/>Unexpected sound of the snow crunching underfoot came from outside.</text:p>
      <text:p text:style-name="Normal"> <text:s text:c="1"/>The door slowly opened, letting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 misting up the surrounding air, he was getting closer.</text:p>
      <text:p text:style-name="Normal"> <text:s text:c="1"/>I stood...Though before I could speak, he revealed a war hammer he’d been hiding behind his back. At once he lunged forward. I was too late to react.</text:p>
      <text:p text:style-name="Normal"> <text:s text:c="1"/>With a spike on its bottom, he stabbed at the skin of my stomach, sending me back to the floor.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were usually described to see.</text:p>
      <text:p text:style-name="Normal"/>
      <text:p text:style-name="Normal">And they saw nothing.<text:line-brea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