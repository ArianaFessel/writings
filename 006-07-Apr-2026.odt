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P1" style:family="paragraph" style:parent-style-name="Normal">
      <style:paragraph-properties fo:text-align="right"/>
    </style:style>
  </office:automatic-styles>
  <office:body>
    <office:text>
      <text:p text:style-name="P1">7 Apr. 2026</text:p>
      <text:p text:style-name="Normal"/>
      <text:p text:style-name="Normal">I sat in a chair with my cat, in a living room, as I noticed a filthy rat stumbling about with its broken paw near my foot. I first wanted to kill it with this foot, then to draw attention of the cat, but a moment later, I could not help but change my mind.</text:p>
      <text:p text:style-name="Normal"/>
      <text:p text:style-name="Normal">As I looked at it, and it looked back at me, I noticed something I thought of, at first, as odd: It was not as repulsive as I imagined it to be. Anything but! Its deep, dilated, mesmerizing pupils inspired awe in me, as it slowly crawled with its tragically broken foot and a profound, swaying, albeit dirty texture of its grayish fur.</text:p>
      <text:p text:style-name="Normal"/>
      <text:p text:style-name="Normal">It was so tempting I wanted to imprison it, to watch over it daily; but I stopped myself from doing so in time, and reminded myself, that this is just a rat.</text:p>
      <text:p text:style-name="Normal"/>
      <text:p text:style-name="Normal"> <text:s text:c="3"/>»Kill it,« I suddenly heard a seductive voice. It was astoundingly innocent, comparable with that of a maiden and perhaps even more. I paused and pondered a few seconds if I could have begun to hear things already, but there would apparently be no justifiable causes.</text:p>
      <text:p text:style-name="Normal"/>
      <text:p text:style-name="Normal"> <text:s text:c="3"/>»Kill the seamy cat,« I clearly could hear a voice, now without any doubt at all. In truth, I will admit, what my thoughts at that time were preoccupied with, was whether I should have laughed or cried, after having been ordered around by a rat; but it was not done with its talk just yet. »For it hath broken this pretty limb of mine, and rendered me unable to freely walk!« it then said, evoking a deep sense of compassion within me.</text:p>
      <text:p text:style-name="Normal"/>
      <text:p text:style-name="Normal"> <text:s text:c="3"/>»Kill the seamy cat,« she spoke the third time. »For it hath killed dozens of my sisters and brothers.« As she spoke, in the meantime, my breathing grew heavier and faster. My throat dried up and thwarted my attempting to speak.</text:p>
      <text:p text:style-name="Normal"/>
      <text:p text:style-name="Normal"> <text:s text:c="3"/>»Thou shalt avenge the murdered and revenge the murderer,« she demanded next of me, captivating me with her charming voice. »And if you obey, I shall have thee spread a word of me.«</text:p>
      <text:p text:style-name="Normal"/>
      <text:p text:style-name="Normal">I no longer could resist the urge to appreciate her knowledge and beauty, the ethical teaching she gave, for I had long ascertained the fact, that the one in the wrong here she, obviously, was not.</text:p>
      <text:p text:style-name="Normal"/>
      <text:p text:style-name="Normal">I slowly descended from my seat and knelt a few seconds before her. My cat, it seemed, was bewildered from such a sudden and unusual decision, coming from me, for it hath known me a long time.</text:p>
      <text:p text:style-name="Normal"/>
      <text:p text:style-name="Normal">As it caught the sight of the standing rat nearby, it ran in her direction almost instantly, which only deepened my belief in my cat’s wrongful, cretinous instinct, as I stopped it, hugged it from behind, and twisted its neck.</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