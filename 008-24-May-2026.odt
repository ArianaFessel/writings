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24 May 2026</text:p>
      <text:p text:style-name="Normal"/>
      <text:p text:style-name="Normal">Drowning, I thought. I was drowning.</text:p>
      <text:p text:style-name="Normal"/>
      <text:p text:style-name="Normal"><text:span text:style-name="T1">...Fuck!</text:span></text:p>
      <text:p text:style-name="Normal"/>
      <text:p text:style-name="Normal">Panic engulfed me. I thrashed about and punched the acrylic with my leg.</text:p>
      <text:p text:style-name="Normal"> <text:s text:c="1"/>As I sat up, I collapsed against the cold, porcelain wall behind.</text:p>
      <text:p text:style-name="Normal"> <text:s text:c="1"/>My breath came fast and I coughed with my sore throat. Tears and bathwater blurred my vision.</text:p>
      <text:p text:style-name="Normal"/>
      <text:p text:style-name="Normal">I’d fallen asleep, I remembered. I’d forgotten to leave the faucet on, too.</text:p>
      <text:p text:style-name="Normal"> <text:s text:c="1"/>Maybe I’d stopped it without thinking, I did not know.</text:p>
      <text:p text:style-name="Normal"/>
      <text:p text:style-name="Normal">I directed my gaze at a ceiling mirror. It reflected me in almost completely transparent liquid.</text:p>
      <text:p text:style-name="Normal"/>
      <text:p text:style-name="Normal">It seems I’d submerged while dreaming.</text:p>
      <text:p text:style-name="Normal"/>
      <text:p text:style-name="Normal">...And the hypnotic didn’t relieve me at all.</text:p>
      <text:p text:style-name="Normal"/>
      <text:p text:style-name="Normal">I sighed, laid back and spaced out, postponing getting up.</text:p>
      <text:p text:style-name="Normal"> <text:s text:c="1"/>The water had long lost its warmth, leaving me to tremble with cold.</text:p>
      <text:p text:style-name="Normal"/>
      <text:p text:style-name="Normal">„Why bother?“ I hissed, then stood and wrapped myself in a towel.</text:p>
      <text:p text:style-name="Normal"> <text:s text:c="1"/>On opening the door I asked loudly: „Is it today?“</text:p>
      <text:p text:style-name="Normal"/>
      <text:p text:style-name="Normal"/>
      <text:p text:style-name="Normal">In the living room an elderly man was sitting on a chair.</text:p>
      <text:p text:style-name="Normal"> <text:s text:c="1"/>He was of smart appearance and asleep, using his cane as support.</text:p>
      <text:p text:style-name="Normal"/>
      <text:p text:style-name="Normal">With this chair being the only furniture, the room looked spacious.</text:p>
      <text:p text:style-name="Normal"/>
      <text:p text:style-name="Normal"><text:span text:style-name="T1">...And why treat me like I’m already dead, and sell off </text:span>my<text:span text:style-name="T1"> – Mind you, </text:span>my<text:span text:style-name="T1"> – belongings? As if </text:span>they <text:span text:style-name="T1">aren’t going to die eventually!</text:span></text:p>
      <text:p text:style-name="Normal"/>
      <text:p text:style-name="Normal">I switched my attention, gazed at the man again.</text:p>
      <text:p text:style-name="Normal"> <text:s text:c="1"/>„Indeed today“, I whispered belatedly, as by habit.</text:p>
      <text:p text:style-name="Normal"/>
      <text:p text:style-name="Normal"><text:span text:style-name="T1">Well I’m in no rush.</text:span></text:p>
      <text:p text:style-name="Normal"/>
      <text:p text:style-name="Normal">I walked into a bedroom and fell on the cushion.</text:p>
      <text:p text:style-name="Normal"> <text:s text:c="1"/>The outside was full of fog, as I could see through the window to my left.</text:p>
      <text:p text:style-name="Normal"> <text:s text:c="1"/>I sat up and opened it. The mist flowed down, gradually filling the space.</text:p>
      <text:p text:style-name="Normal"/>
      <text:p text:style-name="Normal">Though beneath the blanket, I again had to tremble.</text:p>
      <text:p text:style-name="Normal"/>
      <text:p text:style-name="Normal">My eyes carefully inspected the room...</text:p>
      <text:p text:style-name="Normal"> <text:s text:c="1"/>The small cabinet with books and notepads.</text:p>
      <text:p text:style-name="Normal"> <text:s text:c="1"/>The two large ones with table games and clothes.</text:p>
      <text:p text:style-name="Normal"/>
      <text:p text:style-name="Normal">An empty fridge, that long ago had stopped working.</text:p>
      <text:p text:style-name="Normal"/>
      <text:p text:style-name="Normal">I stood and took a magic cube from the shelf, and returned to the bed.</text:p>
      <text:p text:style-name="Normal"> <text:s text:c="1"/>Playing around I dawdled away about half an hour.</text:p>
      <text:p text:style-name="Normal"/>
      <text:p text:style-name="Normal">Then I noticed that the man stood at this room’s threshold.</text:p>
      <text:p text:style-name="Normal"> <text:s text:c="1"/>„Want to play something?“ I asked him.</text:p>
      <text:p text:style-name="Normal"> <text:s text:c="1"/>The gentleman replied gruffly and with delay: „No. We’ve to go.“</text:p>
      <text:p text:style-name="Normal"/>
      <text:p text:style-name="Normal">There was some pity in his eyes. <text:span text:style-name="T1">Huh, treating me like a goner too?</text:span></text:p>
      <text:p text:style-name="Normal"> <text:s text:c="1"/>I put on some clothes, we exited the building. It was the first storey and did not take much time.</text:p>
      <text:p text:style-name="Normal"> <text:s text:c="1"/>The streets were usual and empty.</text:p>
      <text:p text:style-name="Normal"/>
      <text:p text:style-name="Normal">It’s almost painful how the hospital was only tens of meters away.</text:p>
      <text:p text:style-name="Normal"/>
      <text:p text:style-name="Normal">I figured it’d be fine if I did not wear much, even if it was indeed cold, but now that I was actually trembling, I knew it was not.</text:p>
      <text:p text:style-name="Normal"/>
      <text:p text:style-name="Normal">The trembling continued to intensify. My teeth were chattering.</text:p>
      <text:p text:style-name="Normal"/>
      <text:p text:style-name="Normal">We stood in front of the hospital – the staircase – as I heard a close, sudden, piercing pop.</text:p>
      <text:p text:style-name="Normal"> <text:s text:c="1"/>I knelt and covered my ears with my palms. There was an almost unbearable pain.</text:p>
      <text:p text:style-name="Normal"/>
      <text:p text:style-name="Normal">I was looking at the ground, and I saw by the legs of the man that he had stopped, and turned in my direction.</text:p>
      <text:p text:style-name="Normal"/>
      <text:p text:style-name="Normal">...Still, it was silent.</text:p>
      <text:p text:style-name="Normal"/>
      <text:p text:style-name="Normal">A premonition came over me. I slowly raised my gaze.</text:p>
      <text:p text:style-name="Normal"> <text:s text:c="1"/>His mouth moved, he seemed to talk, but I heard nothing.</text:p>
      <text:p text:style-name="Normal"/>
      <text:p text:style-name="Normal">My hearing gradually recovered, the sound of his words cleared, yet I still wouldn’t grasp their meaning.</text:p>
      <text:p text:style-name="Normal"/>
      <text:p text:style-name="Normal">His face remained friendly, but I slowly began to feel anxious. Then angsty.</text:p>
      <text:p text:style-name="Normal"/>
      <text:p text:style-name="Normal">The gentleman offered his hand and looked at me with a tender smile on his face, but I could sense hypocrisy in his eyes. His figure looked strange––the very nature of it was wrong, and I couldn’t bear its existence.</text:p>
      <text:p text:style-name="Normal"/>
      <text:p text:style-name="Normal">I stepped back without moving my gaze away from him. He looked perplexed and perhaps wanted to help me, but even this felt insincere. It appeared to me that his every action and feeling were a part of the mask, merely an act.</text:p>
      <text:p text:style-name="Normal"/>
      <text:p text:style-name="Normal">As I sensed his hand touch mine, I jerked it off and ran back in the direction of my home.</text:p>
      <text:p text:style-name="Normal"> <text:s text:c="1"/>Breathing was growing harder; I had to slow down, but I never stopped.</text:p>
      <text:p text:style-name="Normal"/>
      <text:p text:style-name="Normal">I moved past fenced gardens, houses of the rich and those of the poor.</text:p>
      <text:p text:style-name="Normal"> <text:s text:c="1"/>This time there were a lot of people around me, but their every action was inauthentic, too.</text:p>
      <text:p text:style-name="Normal"/>
      <text:p text:style-name="Normal">A mother, playing with her unwished-for child.</text:p>
      <text:p text:style-name="Normal">A lovely couple, both entangled in some affair.</text:p>
      <text:p text:style-name="Normal">Young adults, engaging in sham marriage.</text:p>
      <text:p text:style-name="Normal">Teenagers...</text:p>
      <text:p text:style-name="Normal"/>
      <text:p text:style-name="Normal">Hell, even damned toddlers staying with others, for their personal gain.</text:p>
      <text:p text:style-name="Normal"/>
      <text:p text:style-name="Normal"/>
      <text:p text:style-name="Normal">I wanted to throw up. It was disgusting. Way too disgusting...</text:p>
      <text:p text:style-name="Normal"/>
      <text:p text:style-name="Normal">I hustled into my apartment, sealed it off. Windows, too.</text:p>
      <text:p text:style-name="Normal"> <text:s text:c="1"/>I went into bathroom, shut myself in and leaned against the door.</text:p>
      <text:p text:style-name="Normal"> <text:s text:c="1"/>To calm down I laid in the bathtub and turned the faucet on.</text:p>
      <text:p text:style-name="Normal"/>
      <text:p text:style-name="Normal">My eyes were closed, my breathing was accelerated still.</text:p>
      <text:p text:style-name="Normal"> <text:s text:c="1"/>As I thought I’d recovered, I again looked up. At the ceiling, the mirror.</text:p>
      <text:p text:style-name="Normal"/>
      <text:p text:style-name="Normal">...</text:p>
      <text:p text:style-name="Normal"/>
      <text:p text:style-name="Normal">From top to toe I was covered in green thorns. Roses bloomed, red and blue.</text:p>
      <text:p text:style-name="Normal"> <text:s text:c="1"/>Scattered across my legs, there were countless small buds and the clusters of blossom, on my left chest and neck.</text:p>
      <text:p text:style-name="Normal"/>
      <text:p text:style-name="Normal">The centipedes, underneath and on top of my skin.</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