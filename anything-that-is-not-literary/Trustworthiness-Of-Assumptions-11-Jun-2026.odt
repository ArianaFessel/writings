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 in the same way as “worlds” that we simulate on computers.</text:p>
      <text:p text:style-name="Normal">You can be sure that our world exists, but not prove that it exists in the most conventional meaning of existance, no matter how nonsensial the contrary option might appear to you.</text:p>
      <text:p text:style-name="Normal"/>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it is applicable to them.</text:p>
      <text:p text:style-name="Normal"/>
      <text:p text:style-name="Normal">And if this claim is, after all, equally uncertain, then it means you believe you are, which would prove its own point once again.</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 new beliefs need to be more aligned with your other, deeper conviction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and their very definition of “sour” could differ from yours. Nor can you completely trust an individual, since they are in the same situation as you.</text:p>
      <text:p text:style-name="Normal"/>
      <text:p text:style-name="Normal"/>
      <text:p text:style-name="Normal">No belief is any more trustworthy than any other one in some absolute sense, as they all are equally certain to the person holding it.</text:p>
      <text:p text:style-name="Normal">We choose our beliefs only because they align with our experience and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