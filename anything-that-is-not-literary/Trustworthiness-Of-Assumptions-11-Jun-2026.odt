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Easy enough, right?</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You are always sure of certainty, and so is with uncertainty.</text:p>
      <text:p text:style-name="Normal"/>
      <text:p text:style-name="Normal">And yet, you can always find a reason to doubt something, but not to believe everything is true.</text:p>
      <text:p text:style-name="Normal"/>
      <text:p text:style-name="Normal">You can be sure about this something, but not about its every detail, such as assumed origins and all its aspects.</text:p>
      <text:p text:style-name="Normal"/>
      <text:p text:style-name="Normal">The simplest example is our world, and a statement that it is a simulation.</text:p>
      <text:p text:style-name="Normal">You can be sure that our world exists, but not prove that it exists in the most conventional meaning of existance, no matter how nonsensial the contrary option might appear to you.</text:p>
      <text:p text:style-name="Normal"/>
      <text:p text:style-name="Normal">Therefore, there’s nothing more certain that uncertainty itself.</text:p>
      <text:p text:style-name="Normal"/>
      <text:p text:style-name="Normal">Therefore, there’s only one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more certain than all other claims, as this claim is applicable to them.</text:p>
      <text:p text:style-name="Normal"/>
      <text:p text:style-name="Normal">And if this claim is, after all, uncertain, then it means you believe it is uncertain, which would again prove its own point.</text:p>
      <text:p text:style-name="Normal"/>
      <text:p text:style-name="Normal"/>
      <text:p text:style-name="Normal">This claim about uncertainty does not mean that everything is to be constantly doubted; it’d be impractical.</text:p>
      <text:p text:style-name="Normal"/>
      <text:p text:style-name="Normal">Every proof is based on the speaker’s beliefs, whether they are conscious or not; such as the belief in reason, authority, religion, or subjective experience.</text:p>
      <text:p text:style-name="Normal"/>
      <text:p text:style-name="Normal">Something is going to be justified for one and unjustified for another.</text:p>
      <text:p text:style-name="Normal"/>
      <text:p text:style-name="Normal">In order for you to change beliefs, these new beliefs has to be more aligned with your other, more deeper beliefs, in comparation with the previous ones.</text:p>
      <text:p text:style-name="Normal"/>
      <text:p text:style-name="Normal">For example, you are not going to believe a particular fruit to be sour, if it is not for you.</text:p>
      <text:p text:style-name="Normal"/>
      <text:p text:style-name="Normal">Instead, you would require a reason. A rational justification, and a confirmation by all other people, even though everyone could just lie to you for some reason, or their very definition of sour might differ from yours, or vary drastically among them.</text:p>
      <text:p text:style-name="Normal"/>
      <text:p text:style-name="Normal">Nor can you completely trust an individual, since they are in the same situation as you.</text:p>
      <text:p text:style-name="Normal"/>
      <text:p text:style-name="Normal"/>
      <text:p text:style-name="Normal">No belief is more trustworthy than the other, as they all are certain to the person holding it.</text:p>
      <text:p text:style-name="Normal">We choose our beliefs only because they align with our other visions of the world, which itself is fine.</text:p>
      <text:p text:style-name="Normal"/>
      <text:p text:style-name="Normal">Thus, we are to embrace uncertainty, to accept it, and to live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