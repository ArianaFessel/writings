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right"/>
    </style:style>
  </office:automatic-styles>
  <office:body>
    <office:text>
      <text:p text:style-name="P1">Trustworthiness of Assumptions, 11 Jun. 2026</text:p>
      <text:p text:style-name="Normal"/>
      <text:p text:style-name="Normal">Nothing that is avered is certain<text:span text:style-name="T1">.</text:span></text:p>
      <text:p text:style-name="Normal"><text:span text:style-name="T1">...</text:span></text:p>
      <text:p text:style-name="Normal"/>
      <text:p text:style-name="Normal">Let’s define certainty &amp; uncertainty.</text:p>
      <text:p text:style-name="Normal"/>
      <text:p text:style-name="Normal">Everything that is certain has no chance of being wrong.</text:p>
      <text:p text:style-name="Normal">Everything that is uncertain is not certain.</text:p>
      <text:p text:style-name="Normal"/>
      <text:p text:style-name="Normal">Easy enough, right?</text:p>
      <text:p text:style-name="Normal"/>
      <text:p text:style-name="Normal">When I ask if something is certain, you have two options to choose from: It either is, or it is not.</text:p>
      <text:p text:style-name="Normal">If you are sure, then it is; otherwise it is not.</text:p>
      <text:p text:style-name="Normal"/>
      <text:p text:style-name="Normal">You are always sure of certainty, and so is with uncertainty.</text:p>
      <text:p text:style-name="Normal"/>
      <text:p text:style-name="Normal">And yet, you can always find a reason to doubt something, but not always to believe something is true.</text:p>
      <text:p text:style-name="Normal"/>
      <text:p text:style-name="Normal">You can be sure about this something, but not about its every detail, such as assumed origins and all its aspects.</text:p>
      <text:p text:style-name="Normal"/>
      <text:p text:style-name="Normal"/>
      <text:p text:style-name="Normal">The simplest example is this world, and a statement that it is a simulation.</text:p>
      <text:p text:style-name="Normal">You can be sure that our world exists, but not prove that it exists in the most conventional meaning of existance, no matter how nonsensial the contrary option might appear to you.</text:p>
      <text:p text:style-name="Normal"/>
      <text:p text:style-name="Normal">Therefore, there’s nothing more certain that uncertainty itself.</text:p>
      <text:p text:style-name="Normal"/>
      <text:p text:style-name="Normal">Therefore, there’s only one absolute truth; and that is — its absence; and every actual truthful claim derives from the belief that there is nothing truthful.</text:p>
      <text:p text:style-name="Normal"/>
      <text:p text:style-name="Normal">Therefore, no certain claims can exist, as they all are but a mere lie.</text:p>
      <text:p text:style-name="Normal"/>
      <text:p text:style-name="Normal"/>
      <text:p text:style-name="Normal">It does not matter if the claim about uncertainty being certain is itself certain; it is, however, obviously more certain than all other claims, as this claim is applicable to them.</text:p>
      <text:p text:style-name="Normal"/>
      <text:p text:style-name="Normal">And if this claim is, after all, uncertain, then it means you believe it is uncertain, which would again prove its own point.</text:p>
      <text:p text:style-name="Normal"/>
      <text:p text:style-name="Normal"/>
      <text:p text:style-name="Normal">This claim about uncertainty does not mean that everything is to be constantly doubted; it’d be impractical.</text:p>
      <text:p text:style-name="Normal"/>
      <text:p text:style-name="Normal">Every proof is based on the speaker’s beliefs, whether they are conscious or not; such as the belief in reason, authority, religion, or subjective experience.</text:p>
      <text:p text:style-name="Normal"/>
      <text:p text:style-name="Normal">Something is going to be justified for one and unjustified for another.</text:p>
      <text:p text:style-name="Normal"/>
      <text:p text:style-name="Normal">In order for you to change beliefs, these new beliefs have to be more aligned with your other, more deeper beliefs, in comparation with the previous ones.</text:p>
      <text:p text:style-name="Normal"/>
      <text:p text:style-name="Normal">For example, you are not going to believe a particular fruit to be sour, if it is not<text:span text:style-name="T1"> for you</text:span>.</text:p>
      <text:p text:style-name="Normal"/>
      <text:p text:style-name="Normal">Instead, you would require a reason. A rational justification, and a confirmation by all other people, even if everyone could lie to you for some reason, or their very definition of sour might differ from yours.</text:p>
      <text:p text:style-name="Normal"/>
      <text:p text:style-name="Normal">Nor can you completely trust an individual, since they are in the same situation as you.</text:p>
      <text:p text:style-name="Normal"/>
      <text:p text:style-name="Normal"/>
      <text:p text:style-name="Normal">No belief is more trustworthy than the other, as they all are certain to the person holding it.</text:p>
      <text:p text:style-name="Normal">We choose our beliefs only because they align with our other visions of the world, which itself is fine.</text:p>
      <text:p text:style-name="Normal"/>
      <text:p text:style-name="Normal">Thus, we are to embrace uncertainty, to accept it, and to live in spite of it.</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