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Easy enough, right?</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 in the same way as “worlds” that we simulate on computers.</text:p>
      <text:p text:style-name="Normal">You can be sure that our world exists, but not prove that it exists in the most conventional meaning of existance, no matter how nonsensial the contrary option might appear to you.</text:p>
      <text:p text:style-name="Normal"/>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this claim is applicable to every other claim.</text:p>
      <text:p text:style-name="Normal"/>
      <text:p text:style-name="Normal">And if this claim is, after all, uncertain, then it means you believe it is uncertain, which would again prove its own point.</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the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 new beliefs need to be more aligned with your other, deeper conviction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and their very definition of “sour” could differ from yours. Nor can you completely trust an individual, since they are in the same situation as you.</text:p>
      <text:p text:style-name="Normal"/>
      <text:p text:style-name="Normal"/>
      <text:p text:style-name="Normal">No belief is more trustworthy than the other, as they all are certain to the person holding it.</text:p>
      <text:p text:style-name="Normal">We choose our beliefs only because they align with our experience and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