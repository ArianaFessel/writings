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we aver is certain.</text:p>
      <text:p text:style-name="Normal">...</text:p>
      <text:p text:style-name="Normal"/>
      <text:p text:style-name="Normal">Let us define certainty and uncertainty.</text:p>
      <text:p text:style-name="Normal"/>
      <text:p text:style-name="Normal">Everything that is certain has no chance of being wrong.</text:p>
      <text:p text:style-name="Normal">Everything that is uncertain is not certain.</text:p>
      <text:p text:style-name="Normal"/>
      <text:p text:style-name="Normal">When I ask whether something is certain, you have two options to choose from: It either is, or it is not. If you are sure, then it is. Otherwise it is not.</text:p>
      <text:p text:style-name="Normal"/>
      <text:p text:style-name="Normal"/>
      <text:p text:style-name="Normal">We know very little about the nature of consciousness and our feelings, but it is clear that the world is interpreted through its lens.</text:p>
      <text:p text:style-name="Normal"/>
      <text:p text:style-name="Normal">However nonsensical it may appear to you, for example, there is no proof our world cannot be a simulation, in the way ‘worlds’ on computers are.</text:p>
      <text:p text:style-name="Normal"/>
      <text:p text:style-name="Normal">Even applying common sense, we cannot be certain about our subjective experience because of phenomena like delusional thinking, albeit that very doubt is something we’d believe.</text:p>
      <text:p text:style-name="Normal"/>
      <text:p text:style-name="Normal">Thus, even when we are absolutely certain about something, it is certain only inside our minds.</text:p>
      <text:p text:style-name="Normal"/>
      <text:p text:style-name="Normal"/>
      <text:p text:style-name="Normal">Like with certainty, you are always sure when something is certain.</text:p>
      <text:p text:style-name="Normal"/>
      <text:p text:style-name="Normal">Yet you always can find a reason to doubt something, but not always to believe something is true.</text:p>
      <text:p text:style-name="Normal"/>
      <text:p text:style-name="Normal"/>
      <text:p text:style-name="Normal">Even if you are sure about this something, it will not be the same for its every aspect or assumed origins.</text:p>
      <text:p text:style-name="Normal"/>
      <text:p text:style-name="Normal">The simplest example is this world and a statement from before. You may think that our world exists because you experience it, but you cannot prove that it exists in the most conventional meaning of existence.</text:p>
      <text:p text:style-name="Normal"/>
      <text:p text:style-name="Normal"/>
      <text:p text:style-name="Normal">Therefore, there is nothing more certain than uncertainty.</text:p>
      <text:p text:style-name="Normal"/>
      <text:p text:style-name="Normal">Therefore, there’s only one known, absolute truth; and that is — its absence in our minds; and every actual certain claim derives from the belief that there is nothing certain.</text:p>
      <text:p text:style-name="Normal"/>
      <text:p text:style-name="Normal">Therefore, no certain claims can exist, as they all are but a mere lie.</text:p>
      <text:p text:style-name="Normal"/>
      <text:p text:style-name="Normal"/>
      <text:p text:style-name="Normal"/>
      <text:p text:style-name="Normal">It does not matter if this claim is itself certain; it is, however, obviously closer to being certain than all other (contradicting) claims, as it is applicable to them.</text:p>
      <text:p text:style-name="Normal"/>
      <text:p text:style-name="Normal">All contradicting claims, like ‘there is something we know is certain’ or ‘uncertainty is not certain’, but none of them will conform with all other conditions as well as my claim does. They will have contradictions, like the fact that we experience everything through consciousness, and therefore it cannot be completely reliable.</text:p>
      <text:p text:style-name="Normal"/>
      <text:p text:style-name="Normal">At this point, though, we are not even talking about objectivity anymore. Having definite reasons, I truly believe uncertainty is most certain, and more consistent than everything else. Thus I assume it is the same for every human being, insofar as we are able to experience it.</text:p>
      <text:p text:style-name="Normal"/>
      <text:p text:style-name="Normal"/>
      <text:p text:style-name="Normal">This conclusion does not mean everything is to be constantly doubted; it would be impractical.</text:p>
      <text:p text:style-name="Normal"/>
      <text:p text:style-name="Normal">Every proof is based on the speaker’s beliefs, be they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No belief is any more trustworthy than any other one is some absolute sense, as they all are equally certain to the person holding it. We adapt beliefs only because they align with our other, more deeper convictions, in comparison with previous ones.</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eason, a rational justification – a confirmation by all other people – even if everyone could lie to you for some reason, or their very definition of sour could be different from yours. Nor can you completely trust another individual, since they are in the same situation as you.</text:p>
      <text:p text:style-name="Normal"/>
      <text:p text:style-name="Normal">Here you choose a belief in other people’s experiences, yet you could be just as certain about your own experience, saying something is sour because you feel you know it is, or because you have experienced it as “sour” all your life.</text:p>
      <text:p text:style-name="Normal"/>
      <text:p text:style-name="Normal">No matter what you say, it will always impose your own convictions–your beliefs–as if they were absolute. And so is for every other human being.</text:p>
      <text:p text:style-name="Normal"/>
      <text:p text:style-name="Normal"/>
      <text:p text:style-name="Normal">We might choose our beliefs only because they align with our experience and other visions of the world, but this itself is fine.</text:p>
      <text:p text:style-name="Normal"/>
      <text:p text:style-name="Normal">Even if we try to be more intentional about choosing them,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