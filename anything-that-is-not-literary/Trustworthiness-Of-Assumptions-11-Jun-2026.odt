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right"/>
    </style:style>
  </office:automatic-styles>
  <office:body>
    <office:text>
      <text:p text:style-name="P1">Trustworthiness of Assumptions, 11 Jun. 2026</text:p>
      <text:p text:style-name="Normal"/>
      <text:p text:style-name="Normal">Nothing that is avered is certain<text:span text:style-name="T1">.</text:span></text:p>
      <text:p text:style-name="Normal"><text:span text:style-name="T1">...</text:span></text:p>
      <text:p text:style-name="Normal"/>
      <text:p text:style-name="Normal">Let’s define certainty &amp; uncertainty.</text:p>
      <text:p text:style-name="Normal"/>
      <text:p text:style-name="Normal">Everything that is certain has no chance of being wrong.</text:p>
      <text:p text:style-name="Normal">Everything that is uncertain is not certain.</text:p>
      <text:p text:style-name="Normal"/>
      <text:p text:style-name="Normal">When I ask if something is certain, you have two options to choose from: It either is, or it is not.</text:p>
      <text:p text:style-name="Normal">If you are sure, then it is; otherwise it is not.</text:p>
      <text:p text:style-name="Normal"/>
      <text:p text:style-name="Normal"/>
      <text:p text:style-name="Normal">You are always sure of certainty, and so is with uncertainty.</text:p>
      <text:p text:style-name="Normal"/>
      <text:p text:style-name="Normal">And yet, you can always find a reason to doubt something, but not always to believe something is true.</text:p>
      <text:p text:style-name="Normal"/>
      <text:p text:style-name="Normal">You can be sure about this something, but not about its every detail, such as assumed origins and all its aspects.</text:p>
      <text:p text:style-name="Normal"/>
      <text:p text:style-name="Normal"/>
      <text:p text:style-name="Normal">The simplest example is this world, and a statement that it is a simulation; in the same way as “worlds” that we simulate on computers.</text:p>
      <text:p text:style-name="Normal">You can be sure that our world exists, but not prove that it exists in the most conventional meaning of existance, no matter how nonsensical the contrary option might appear to you.</text:p>
      <text:p text:style-name="Normal"/>
      <text:p text:style-name="Normal"/>
      <text:p text:style-name="Normal">Therefore, there’s nothing more certain that uncertainty itself.</text:p>
      <text:p text:style-name="Normal"/>
      <text:p text:style-name="Normal">Therefore, there’s only one absolute truth; and that is — its absence; and every actual truthful claim derives from the belief that there is nothing truthful.</text:p>
      <text:p text:style-name="Normal"/>
      <text:p text:style-name="Normal">Therefore, no certain claims can exist, as they all are but a mere lie.</text:p>
      <text:p text:style-name="Normal"/>
      <text:p text:style-name="Normal"/>
      <text:p text:style-name="Normal">It does not matter if the claim about uncertainty being certain is itself certain; it is, however, obviously more certain than all other claims, as it is applicable to them.</text:p>
      <text:p text:style-name="Normal"/>
      <text:p text:style-name="Normal">And if this claim is, after all, equally uncertain, then it means you believe it is, which would prove its own point once again.</text:p>
      <text:p text:style-name="Normal"/>
      <text:p text:style-name="Normal"/>
      <text:p text:style-name="Normal">This claim about uncertainty does not mean that everything is to be constantly doubted; it’d be impractical.</text:p>
      <text:p text:style-name="Normal"/>
      <text:p text:style-name="Normal">Every proof is based on the speaker’s beliefs, whether they are conscious or not; such as belief in reason, authority, religion, or subjective experience.</text:p>
      <text:p text:style-name="Normal"/>
      <text:p text:style-name="Normal">Something is going to be justified for one and unjustified for another.</text:p>
      <text:p text:style-name="Normal"/>
      <text:p text:style-name="Normal">In order for you to change beliefs, the new beliefs need to be more aligned with your other, deeper convictions, in comparation with the previous ones.</text:p>
      <text:p text:style-name="Normal"/>
      <text:p text:style-name="Normal">For example, you are not going to believe a particular fruit to be sour, if it is not<text:span text:style-name="T1"> for you</text:span>.</text:p>
      <text:p text:style-name="Normal"/>
      <text:p text:style-name="Normal">Instead, you would require a reason. A rational justification, and a confirmation by all other people, even if everyone could lie to you for some reason, and their very definition of “sour” could differ from yours. Nor can you completely trust an individual, since they are in the same situation as you.</text:p>
      <text:p text:style-name="Normal"/>
      <text:p text:style-name="Normal"/>
      <text:p text:style-name="Normal">No belief is any more trustworthy than any other one in some absolute sense, as they all are equally certain to the person holding it.</text:p>
      <text:p text:style-name="Normal">We choose our beliefs only because they align with our experience and other visions of the world, which itself is fine.</text:p>
      <text:p text:style-name="Normal"/>
      <text:p text:style-name="Normal">Of course we can try to be more intentional about choosing them, but it wouldn’t change the nature of our choice.</text:p>
      <text:p text:style-name="Normal"/>
      <text:p text:style-name="Normal">Thus, we are to embrace uncertainty, to accept it, and to live in spite of it.</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