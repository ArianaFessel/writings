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that we aver is certain.</text:p>
      <text:p text:style-name="Normal">...</text:p>
      <text:p text:style-name="Normal"/>
      <text:p text:style-name="Normal">Let us define certainty and uncertainty.</text:p>
      <text:p text:style-name="Normal"/>
      <text:p text:style-name="Normal">Everything that is certain has no chance of being wrong.</text:p>
      <text:p text:style-name="Normal">Everything that is uncertain is not certain.</text:p>
      <text:p text:style-name="Normal"/>
      <text:p text:style-name="Normal">When I ask whether something is certain, you have two options to choose from.</text:p>
      <text:p text:style-name="Normal">It either is, or it is not. If you are sure, then it is. Otherwise it is not.</text:p>
      <text:p text:style-name="Normal"/>
      <text:p text:style-name="Normal"/>
      <text:p text:style-name="Normal">We know very little about the nature of consciousness and our feelings, but it is clear that the world is interpreted through its lens.</text:p>
      <text:p text:style-name="Normal"/>
      <text:p text:style-name="Normal">However nonsensical it may appear to you, for example, there is no proof our world cannot be a simulation, in the way ‘worlds’ on computers are.</text:p>
      <text:p text:style-name="Normal"/>
      <text:p text:style-name="Normal">Even if we apply common sense, we cannot be certain about out subjective experience. There is phenomena like delusional thinking, and tons of people who’d live years, lying to themselves about truth they do not want to confront, albeit that very doubt is something we’d believe.</text:p>
      <text:p text:style-name="Normal"/>
      <text:p text:style-name="Normal">Thus, even when we are absolutely certain about something, it is certain only inside our minds.</text:p>
      <text:p text:style-name="Normal"/>
      <text:p text:style-name="Normal"/>
      <text:p text:style-name="Normal">Like with certainty, you are always sure when something is certain.</text:p>
      <text:p text:style-name="Normal"/>
      <text:p text:style-name="Normal">Yet you always can find a reason to doubt something, but not always to believe something is true.</text:p>
      <text:p text:style-name="Normal"/>
      <text:p text:style-name="Normal"/>
      <text:p text:style-name="Normal">Even if you are sure about this something, it will not be the same for its every aspect or assumed origins.</text:p>
      <text:p text:style-name="Normal"/>
      <text:p text:style-name="Normal">The simplest example is this world and a statement from before. You may think that our world exists because you experience it, but you cannot prove that it exists in the most conventional meaning of existence.</text:p>
      <text:p text:style-name="Normal"/>
      <text:p text:style-name="Normal"/>
      <text:p text:style-name="Normal">Uncertainty is most predictable, most consistent, and most simple of any phenomena we may only know. Nothing of that sort can be said about certainty and any other things. It is never going to change, as it is applicable to every part of our experience at any time.</text:p>
      <text:p text:style-name="Normal"/>
      <text:p text:style-name="Normal">Since truth is much more likely to turn out simple than overly complex, and every emperical evidence relies on experience, which uncertainty pervades, constantly showing evidence of it, it is to be considered most certain.</text:p>
      <text:p text:style-name="Normal"/>
      <text:p text:style-name="Normal">At this point, of course, we are not even talking about objectivity anymore. Having definite reasons, I truly believe everything I stated here. Thus I assume it is the same for every human being, insofar as we are able to experience uncertainty.</text:p>
      <text:p text:style-name="Normal"/>
      <text:p text:style-name="Normal"/>
      <text:p text:style-name="Normal">Therefore, there is nothing more certain than uncertainty.</text:p>
      <text:p text:style-name="Normal"/>
      <text:p text:style-name="Normal">Therefore there is only one known, absolute truth; and that is — its absence in our minds; and every actual certain claim derives from the belief that there is nothing certain.</text:p>
      <text:p text:style-name="Normal"/>
      <text:p text:style-name="Normal">Therefore, no certain claims can exist, as they all are but a mere lie.</text:p>
      <text:p text:style-name="Normal"/>
      <text:p text:style-name="Normal"/>
      <text:p text:style-name="Normal">This conclusion does not mean everything is to be constantly doubted; it would be impractical.</text:p>
      <text:p text:style-name="Normal"/>
      <text:p text:style-name="Normal">Every proof is based on the speaker’s beliefs, be they conscious or not; such as belief in reason, authority, religion, or subjective experience.</text:p>
      <text:p text:style-name="Normal"/>
      <text:p text:style-name="Normal">Something is going to be justified for one and unjustified for another.</text:p>
      <text:p text:style-name="Normal"/>
      <text:p text:style-name="Normal"/>
      <text:p text:style-name="Normal">No belief is any more trustworthy than any other one is some absolute sense, as they all are equally certain to the person holding it. We adapt beliefs only because they align with our other, more deeper convictions, in comparison with previous ones.</text:p>
      <text:p text:style-name="Normal"/>
      <text:p text:style-name="Normal">For example, you wouldn’t believe a particular fruit is sour, just because somebody said so, if it is not <text:span text:style-name="T1">for you</text:span>.</text:p>
      <text:p text:style-name="Normal"/>
      <text:p text:style-name="Normal">Instead you would require a reason, a rational justification – a confirmation by all other people – even if everyone could lie to you for some reason, or their very definition of sour could be different from yours. Nor can you completely trust another individual, since they are in the same situation as you.</text:p>
      <text:p text:style-name="Normal"/>
      <text:p text:style-name="Normal">Here you choose to believe in somebody else’s experience, yet you could be just as certain about your own experience, saying something is sour because you feel you know it is, or because you have experienced it as “sour” all your life.</text:p>
      <text:p text:style-name="Normal"/>
      <text:p text:style-name="Normal">No matter what you say, it will always impose your own convictions–your beliefs–as if they were absolute. And so is for every other human being.</text:p>
      <text:p text:style-name="Normal"/>
      <text:p text:style-name="Normal"/>
      <text:p text:style-name="Normal">We might choose our beliefs only because they align with our experience and other visions of the world, but this itself is fine.</text:p>
      <text:p text:style-name="Normal"/>
      <text:p text:style-name="Normal">Though we could try to be more intentional about choosing them, it wouldn’t change the nature of our choice.</text:p>
      <text:p text:style-name="Normal"/>
      <text:p text:style-name="Normal">Thus we are to embrace uncertainty, to accept it, and to act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