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Easy enough, right?</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You are always sure of certainty, and so is with uncertainty.</text:p>
      <text:p text:style-name="Normal"/>
      <text:p text:style-name="Normal">And yet, you can always find a reason to doubt something, but not always to believe something is true.</text:p>
      <text:p text:style-name="Normal"/>
      <text:p text:style-name="Normal">You can be sure about this something, but not about its every detail, such as assumed origins and all its aspects.</text:p>
      <text:p text:style-name="Normal"/>
      <text:p text:style-name="Normal"/>
      <text:p text:style-name="Normal">The simplest example is this world, and a statement that it is a simulation; in the same way as “worlds” that we simulate on computers.</text:p>
      <text:p text:style-name="Normal">You can be sure that our world exists, but not prove that it exists in the most conventional meaning of existance, no matter how nonsensial the contrary option might appear to you.</text:p>
      <text:p text:style-name="Normal"/>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it is applicable to them.</text:p>
      <text:p text:style-name="Normal"/>
      <text:p text:style-name="Normal">And if this claim is, after all, uncertain, then it means you believe it is uncertain, which would again prove its own point.</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the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 new beliefs need to be more aligned with your other, deeper convictions, in comparation with the previous ones.</text:p>
      <text:p text:style-name="Normal"/>
      <text:p text:style-name="Normal">For example, you are not going to believe a particular fruit to be sour, if it is not<text:span text:style-name="T1"> for you</text:span>.</text:p>
      <text:p text:style-name="Normal"/>
      <text:p text:style-name="Normal">Instead, you would require a reason. A rational justification, and a confirmation by all other people, even if everyone could lie to you for some reason, and their very definition of “sour” could differ from yours. Nor can you completely trust an individual, since they are in the same situation as you.</text:p>
      <text:p text:style-name="Normal"/>
      <text:p text:style-name="Normal"/>
      <text:p text:style-name="Normal">No belief is more trustworthy than the other in some absolute sense, as they all are certain to the person holding it.</text:p>
      <text:p text:style-name="Normal">We choose our beliefs only because they align with our experience and other visions of the world, which itself is fine.</text:p>
      <text:p text:style-name="Normal"/>
      <text:p text:style-name="Normal">Of course we can try to be more intentional about choosing them, but it wouldn’t change the nature of our choic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