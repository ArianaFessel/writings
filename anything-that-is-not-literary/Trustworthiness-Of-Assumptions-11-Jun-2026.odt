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right"/>
    </style:style>
  </office:automatic-styles>
  <office:body>
    <office:text>
      <text:p text:style-name="P1">Trustworthiness of Assumptions, 11 Jun. 2026</text:p>
      <text:p text:style-name="Normal"/>
      <text:p text:style-name="Normal">Nothing that is avered is certain<text:span text:style-name="T1">.</text:span></text:p>
      <text:p text:style-name="Normal"><text:span text:style-name="T1">...</text:span></text:p>
      <text:p text:style-name="Normal"/>
      <text:p text:style-name="Normal">Let’s define certainty &amp; uncertainty.</text:p>
      <text:p text:style-name="Normal"/>
      <text:p text:style-name="Normal">Everything that is certain has no chance of being wrong.</text:p>
      <text:p text:style-name="Normal">Everything that is uncertain is not certain.</text:p>
      <text:p text:style-name="Normal"/>
      <text:p text:style-name="Normal">When I ask if something is certain, you have two options to choose from: It either is, or it is not.</text:p>
      <text:p text:style-name="Normal">If you are sure, then it is; otherwise it is not.</text:p>
      <text:p text:style-name="Normal"/>
      <text:p text:style-name="Normal"/>
      <text:p text:style-name="Normal">There are two kinds of certainty: An objective one and a subjective one.</text:p>
      <text:p text:style-name="Normal"/>
      <text:p text:style-name="Normal">That which is objectively certain is certain outside of your mind.</text:p>
      <text:p text:style-name="Normal">That which is subjectively certain is certain only inside of it.</text:p>
      <text:p text:style-name="Normal"/>
      <text:p text:style-name="Normal">As the objective world is processed through consciousness–lens of our subjective experience–the interpretation of external can be influenced, and thus contain delusions.</text:p>
      <text:p text:style-name="Normal"/>
      <text:p text:style-name="Normal">The only way you can be sure of something is by defining all conditions that make it certain internally.</text:p>
      <text:p text:style-name="Normal"/>
      <text:p text:style-name="Normal"/>
      <text:p text:style-name="Normal">Like with certainty, you are always sure when something is uncertain.</text:p>
      <text:p text:style-name="Normal">Yet you can always find a reason to doubt something, but not always to believe something is true.</text:p>
      <text:p text:style-name="Normal">You can be sure about this something, but not about its every detail, such as assumed origins and all other aspects.</text:p>
      <text:p text:style-name="Normal"/>
      <text:p text:style-name="Normal"/>
      <text:p text:style-name="Normal">The simplest example is this world, and a statement that it is a simulation, like the “worlds” in computers.</text:p>
      <text:p text:style-name="Normal"/>
      <text:p text:style-name="Normal">You may think that our world exists because you experience it, but you can’t prove that it exists in the most conventional meaning of existance, no matter how nonsensical the contrary option might appear to you.</text:p>
      <text:p text:style-name="Normal"/>
      <text:p text:style-name="Normal"/>
      <text:p text:style-name="Normal">Therefore, there’s nothing more certain that uncertainty.</text:p>
      <text:p text:style-name="Normal"/>
      <text:p text:style-name="Normal">Therefore, there’s only one known, absolute truth; and that is — its absence; and every actual truthful claim derives from the belief that there is nothing truthful.</text:p>
      <text:p text:style-name="Normal"/>
      <text:p text:style-name="Normal">Therefore, no certain claims can exist, as they all are but a mere lie.</text:p>
      <text:p text:style-name="Normal"/>
      <text:p text:style-name="Normal"/>
      <text:p text:style-name="Normal">It does not matter if the claim about uncertainty being certain is itself certain; it is, however, obviously closer to being certain than all other (contradicting) claims, as it is applicable to them.</text:p>
      <text:p text:style-name="Normal"/>
      <text:p text:style-name="Normal">More often than not, the truth will turn out to be simpler than overly complex; you could find a claim contradicting mine, but none of them will be more plausible. (See: Occam’s Razor principle)</text:p>
      <text:p text:style-name="Normal"/>
      <text:p text:style-name="Normal">Depending on your perspective, you could call it practical rather than objective. I consider uncertainty not a separate entity, but merely absence of certainty; and in either case, it changes nothing.</text:p>
      <text:p text:style-name="Normal"/>
      <text:p text:style-name="Normal"/>
      <text:p text:style-name="Normal">This claim about uncertainty does not mean that everything is to be constantly doubted; it would be impractical.</text:p>
      <text:p text:style-name="Normal"/>
      <text:p text:style-name="Normal">Every proof is based on the speaker’s beliefs, be they are conscious or not; such as belief in reason, authority, religion, or subjective experience.</text:p>
      <text:p text:style-name="Normal"/>
      <text:p text:style-name="Normal">Something is going to be justified for one and unjustified for another.</text:p>
      <text:p text:style-name="Normal"/>
      <text:p text:style-name="Normal"/>
      <text:p text:style-name="Normal">In order for you to change beliefs, the new ones have to be more aligned with your other, deeper convictions, in comparation with the previous ones.</text:p>
      <text:p text:style-name="Normal"/>
      <text:p text:style-name="Normal">For example, you wouldn’t believe a particular fruit is sour, just because somebody said so, if it is not <text:span text:style-name="T1">for you</text:span>.</text:p>
      <text:p text:style-name="Normal"/>
      <text:p text:style-name="Normal">Instead, you would require a reason. A rational justification, and a confirmation by all other people, even if everyone could lie to you for some reason, and their very definition of “sour” could be different from yours. Nor can you completely trust another individual, since they are in the same situation as you.</text:p>
      <text:p text:style-name="Normal"/>
      <text:p text:style-name="Normal"/>
      <text:p text:style-name="Normal">No belief is any more trustworthy than any other one in some absolute sense, as they all are equally certain to the person holding it.</text:p>
      <text:p text:style-name="Normal">We choose our beliefs only because they align with our experience and other visions of the world, which itself is fine.</text:p>
      <text:p text:style-name="Normal">Of course we can try to be more intentional about choosing them, but it wouldn’t change the nature of our choice.</text:p>
      <text:p text:style-name="Normal"/>
      <text:p text:style-name="Normal">Thus, we are to embrace uncertainty, to accept it, and to act in spite of it.</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