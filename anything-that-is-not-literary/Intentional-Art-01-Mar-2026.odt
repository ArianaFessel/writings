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Intentional Art, 1 Mar. 2026</text:p>
      <text:p text:style-name="Normal"/>
      <text:p text:style-name="Normal">Imagine yourself writing. You do it without an audience in mind, so there’s nothing to forbid you doing whatever it is that you desire. You make countless mistakes: Grammar, orthography, word choice, style. You, however, are unaware until someone else points it out.</text:p>
      <text:p text:style-name="Normal"/>
      <text:p text:style-name="Normal">And yet, what if it doesn’t matter to you?</text:p>
      <text:p text:style-name="Normal"/>
      <text:p text:style-name="Normal">You change your attitude. You do everything you wish, and there’s no reason to care if others perceive it well, or whether you will in future. Surely there are tons of mistakes once more, but it’s most important that you enjoy it, and everything else fades to background.</text:p>
      <text:p text:style-name="Normal"/>
      <text:p text:style-name="Normal">Yet, you nevertheless find something you want to edit in the process.</text:p>
      <text:p text:style-name="Normal"/>
      <text:p text:style-name="Normal">You try to fix it, but it’s no good, no matter how much time you spend, and you decide to drop the idea.</text:p>
      <text:p text:style-name="Normal"/>
      <text:p text:style-name="Normal">***</text:p>
      <text:p text:style-name="Normal">Here, having refused all external standards, your only remaining problem is conflict of intentions: You want to do something, but it contradicts what you’ve done already, or what you have thought about in advance.</text:p>
      <text:p text:style-name="Normal"> <text:s text:c="1"/>You want to keep the already-existing and emergent elements, yet it’s impossible. You try to find a compromise, but no solution comes to your head.</text:p>
      <text:p text:style-name="Normal"/>
      <text:p text:style-name="Normal">***</text:p>
      <text:p text:style-name="Normal">When a piece is made with an audience in mind, you get reasonable standards to compare it with: You want it to be read by others, and perhaps to make it evoke specific feelings. Thus, wishing to hear their thoughts, you search for feedback and adjust the writing accordingly.</text:p>
      <text:p text:style-name="Normal"/>
      <text:p text:style-name="Normal">If you, however, write only for yourself, whether you need feedback is up to you to decide. You may want to internalize these external standards, but this time, it will be completely your choice, and you can stop at any time you wish.</text:p>
      <text:p text:style-name="Normal"/>
      <text:p text:style-name="Normal">That is when conflict of intentions is the only possible problem in art.</text:p>
      <text:p text:style-name="Normal"/>
      <text:p text:style-name="Normal">These intentions include how your work is to be read, by whom, and if it is to be read at all; as well as everything else about this piece.</text:p>
      <text:p text:style-name="Normal"/>
      <text:p text:style-name="Normal">Everything is deliberate to a degree, since everything is done with a kind of prescience, even if unconscious.</text:p>
      <text:p text:style-name="Normal"/>
      <text:p text:style-name="Normal">If you write a sentence incorrectly, and if this mistake was not deliberate, your intention obviously was not to write it controversially, but merely to write it the way it is. Whether the mismatch between intention and effect on reader is important is for you to decide.</text:p>
      <text:p text:style-name="Normal"/>
      <text:p text:style-name="Normal">You can forget what you meant by something, but it again means that your intention was to write it the way it is, which does not include preserving clarity. You might have forgotten the meaning of what you’ve written, but it is not the same as mismatch between intention and result, as opposed to effect this result produces.</text:p>
      <text:p text:style-name="Normal"/>
      <text:p text:style-name="Normal">As you don’t recognize the falsehood, it is not an issue, and becomes such only after you declare it to be.</text:p>
      <text:p text:style-name="Normal"/>
      <text:p text:style-name="Normal">Upon discovering grammatical fallacies, usually you have to change them, as it creates friction while reading.</text:p>
      <text:p text:style-name="Normal"/>
      <text:p text:style-name="Normal">But if you decide it doesn’t matter at all, and accept it, then no one is able to argue with you, and you can’t be considered wrong in your choice, as you make it knowing well it’s considered wrong elsewhere.</text:p>
      <text:p text:style-name="Normal"/>
      <text:p text:style-name="Normal"/>
      <text:p text:style-name="Normal">At this point, the only justified criteria for assessment of excellence is your own satisfaction. You can consider the piece accomplished once it feels like it, and stop once it doesn’t.</text:p>
      <text:p text:style-name="Normal"/>
      <text:p text:style-name="Normal">There are two ways to achieve it: To rewrite and get closer to what you currently want it to be, or to change your attitude toward the piece, for example by accepting something you previously assumed was a mistake.</text:p>
      <text:p text:style-name="Normal"/>
      <text:p text:style-name="Normal">Improvement, which is the same as bringing a piece closer to your current desires, is possible only if you know them well enough to follow.</text:p>
      <text:p text:style-name="Normal"/>
      <text:p text:style-name="Normal">And while they can be discovered in the process of writing, the more you know about them in advance, the easier everything else is going to be, and the less chances there are that you will abandon the projec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