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Intentional Art, 1 Mar. 2026</text:p>
      <text:p text:style-name="Normal"/>
      <text:p text:style-name="Normal">Imagine yourself writing.</text:p>
      <text:p text:style-name="Normal"> <text:s text:c="1"/>You do it without an audience in mind, and there’s nothing to stop you from doing whatever you desire.</text:p>
      <text:p text:style-name="Normal"> <text:s text:c="1"/>You’re making countless mistakes: Grammar, orthography, word choice, style.</text:p>
      <text:p text:style-name="Normal"> <text:s text:c="1"/>You, however, do not recognize them until someone else points it out.</text:p>
      <text:p text:style-name="Normal"/>
      <text:p text:style-name="Normal">Sure, the reason is obvious: You are biased.</text:p>
      <text:p text:style-name="Normal"/>
      <text:p text:style-name="Normal">And yet, what if you don’t care?</text:p>
      <text:p text:style-name="Normal"/>
      <text:p text:style-name="Normal">You change your attitude.</text:p>
      <text:p text:style-name="Normal"> <text:s text:c="1"/>You do everything you wish, and there’s absolutely no reason for it to matter, if it’s perceived well by others, or whether it will be by you in future.</text:p>
      <text:p text:style-name="Normal"> <text:s text:c="1"/>Surely, you are making tons of mistakes once more; but you don’t care, since it is most important that you enjoy it.</text:p>
      <text:p text:style-name="Normal"/>
      <text:p text:style-name="Normal">And yet, you nevertheless find something you want to edit in the process.</text:p>
      <text:p text:style-name="Normal"/>
      <text:p text:style-name="Normal">You try to fix it, but it’s no good no matter how much time you spend, and you decide to drop the project.</text:p>
      <text:p text:style-name="Normal"/>
      <text:p text:style-name="Normal">***</text:p>
      <text:p text:style-name="Normal">Here, having refused all external standards, your only remaining problem is conflict of intentions: You want to do something, but it contradicts what you’ve done already, or what you have thought about in advance.</text:p>
      <text:p text:style-name="Normal"> <text:s text:c="1"/>You want to keep the already-existing and emergent elements, yet it’s impossible. You try to find a compromise, but nothing goes to your head.</text:p>
      <text:p text:style-name="Normal"/>
      <text:p text:style-name="Normal">***</text:p>
      <text:p text:style-name="Normal">When a piece is made with an audience in mind, you get reasonable standards to compare it with: You want it to be read by others, and perhaps to make it evoke specific feelings. Thus, wishing to hear their thoughts, you search for feedback and adjust the writing accordingly.</text:p>
      <text:p text:style-name="Normal"/>
      <text:p text:style-name="Normal">If you, however, write only for yourself, whether you need feedback is up to you to decide. You may want to internalize these external standards, but this time, it will be completely your choice, and you can stop at any time you wish.</text:p>
      <text:p text:style-name="Normal"/>
      <text:p text:style-name="Normal">That is when conflict of intentions is the only possible problem in art.</text:p>
      <text:p text:style-name="Normal"/>
      <text:p text:style-name="Normal">These intentions include how your work is to be read, by whom, and if it is to be read at all; as well as everything else about this piece.</text:p>
      <text:p text:style-name="Normal"/>
      <text:p text:style-name="Normal">Everything is deliberate to a degree, since everything is done with a kind of prescience, even if unconscious.</text:p>
      <text:p text:style-name="Normal"/>
      <text:p text:style-name="Normal">As you don’t recognize the falsehood, it is not an issue, and becomes such only after you declare it to be.</text:p>
      <text:p text:style-name="Normal"/>
      <text:p text:style-name="Normal">Upon discovering grammatical fallacies, usually you have to change them, as it creates friction while reading.</text:p>
      <text:p text:style-name="Normal"/>
      <text:p text:style-name="Normal">But if you decide it doesn’t matter at all and accept it, then no one is be able to argue with you, and you can’t be considered wrong in your choice, as you make it knowing well that it’s seen as wrong elsewhere.</text:p>
      <text:p text:style-name="Normal"/>
      <text:p text:style-name="Normal"/>
      <text:p text:style-name="Normal">That is also when the only justified criteria for assessment of excellence is your own satisfaction.</text:p>
      <text:p text:style-name="Normal"/>
      <text:p text:style-name="Normal">You can consider the piece accomplished once it feels like it, and stop once it does not.</text:p>
      <text:p text:style-name="Normal"/>
      <text:p text:style-name="Normal">Hence, there are two ways to achieve this self-satisfaction: To rewrite and get closer to what you currently want, or to artificially change your own attitude toward the piece, for example by accepting something you previously assumed to be a mistake.</text:p>
      <text:p text:style-name="Normal"/>
      <text:p text:style-name="Normal">And the only way to improve something would be to get closer to current desires.</text:p>
      <text:p text:style-name="Normal"/>
      <text:p text:style-name="Normal">Since what produces intention are these desires, you have to know them well enough to follow them, and to be capable of satisfaction.</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